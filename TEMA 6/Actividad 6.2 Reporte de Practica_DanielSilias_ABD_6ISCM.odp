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AAFB93F.png" manifest:media-type="image/png"/>
  <manifest:file-entry manifest:full-path="Pictures/100000000000078000000438D9ABD64E.png" manifest:media-type="image/png"/>
  <manifest:file-entry manifest:full-path="Pictures/1000000000000780000004384CB2FCB7.png" manifest:media-type="image/png"/>
  <manifest:file-entry manifest:full-path="Pictures/100000000000078000000438F0621FEA.png" manifest:media-type="image/png"/>
  <manifest:file-entry manifest:full-path="Pictures/100000000000078000000438403AFE24.png" manifest:media-type="image/png"/>
  <manifest:file-entry manifest:full-path="Pictures/10000000000007800000043867A19720.png" manifest:media-type="image/png"/>
  <manifest:file-entry manifest:full-path="Pictures/1000000000000780000004389C24BFD2.png" manifest:media-type="image/png"/>
  <manifest:file-entry manifest:full-path="Pictures/1000000000000508000000919C9F805E.jpg" manifest:media-type="image/jpeg"/>
  <manifest:file-entry manifest:full-path="Pictures/10000001000003AF00000212C2CB87FC.png" manifest:media-type="image/png"/>
  <manifest:file-entry manifest:full-path="Pictures/10000000000007800000043874AA6871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DejaVu Sans" svg:font-family="'DejaVu Sans'" style:font-family-generic="swiss" style:font-pitch="variable"/>
    <style:font-face style:name="Fira Code SemiBold" svg:font-family="'Fira Code SemiBold'" style:font-pitch="fixed"/>
    <style:font-face style:name="Fira Code SemiBold1" svg:font-family="'Fira Code SemiBold'" style:font-adornments="Regular" style:font-pitch="fixed"/>
    <style:font-face style:name="FreeSans" svg:font-family="FreeSans" style:font-family-generic="system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 style:list-style-name="L5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089cm, 3.791cm, 14.134cm, 9.814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005cm, 15.986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34cm" fo:min-width="3.561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1.703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36cm, 15.886cm, 9.056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95cm, 17.208cm, 0cm, 9.094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6.828cm, 21.773cm, 0cm)" draw:image-opacity="100%" style:mirror="none" loext:decorative="false"/>
    </style:style>
    <style:style style:name="pr1" style:family="presentation" style:parent-style-name="Metropolis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Metropolis-title">
      <style:graphic-properties fo:min-height="1.352cm" loext:decorative="false"/>
      <style:paragraph-properties style:writing-mode="lr-tb"/>
    </style:style>
    <style:style style:name="pr3" style:family="presentation" style:parent-style-name="Metropolis-outline1">
      <style:graphic-properties fo:min-height="0.101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10.549cm" loext:decorative="false"/>
      <style:paragraph-properties style:writing-mode="lr-tb"/>
    </style:style>
    <style:style style:name="pr6" style:family="presentation" style:parent-style-name="Metropolis-notes">
      <style:graphic-properties draw:fill-color="#ffffff" draw:auto-grow-height="false" fo:min-height="13.171cm" loext:decorative="false"/>
      <style:paragraph-properties style:writing-mode="lr-tb"/>
    </style:style>
    <style:style style:name="pr7" style:family="presentation" style:parent-style-name="Metropolis-title">
      <style:graphic-properties fo:min-height="4.683cm" loext:decorative="false"/>
      <style:paragraph-properties style:writing-mode="lr-tb"/>
    </style:style>
    <style:style style:name="pr8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etropolis-title">
      <style:graphic-properties draw:auto-grow-height="true" fo:min-height="3.465cm" loext:decorative="false"/>
      <style:paragraph-properties style:writing-mode="lr-tb"/>
    </style:style>
    <style:style style:name="pr11" style:family="presentation" style:parent-style-name="Metropolis-title">
      <style:graphic-properties fo:min-height="3.465cm" loext:decorative="false"/>
      <style:paragraph-properties style:writing-mode="lr-tb"/>
    </style:style>
    <style:style style:name="pr12" style:family="presentation" style:parent-style-name="Metropolis-outline1">
      <style:graphic-properties fo:min-height="4.5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M Sans Demi Cond 10" fo:font-size="15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M Sans Demi Cond 10" fo:font-size="15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 style:font-name="Fira Code SemiBold1"/>
    </style:style>
    <style:style style:name="P6" style:family="paragraph">
      <style:paragraph-properties fo:margin-top="0.42cm" fo:margin-bottom="0.35cm" fo:text-align="left"/>
    </style:style>
    <style:style style:name="P7" style:family="paragraph">
      <style:paragraph-properties fo:margin-top="0.42cm" fo:margin-bottom="0.35cm" fo:text-align="left"/>
      <style:text-properties fo:color="#000000" loext:opacity="100%" style:font-name="DejaVu Sans" fo:font-size="13pt" style:font-size-asian="10pt" style:font-size-complex="10pt"/>
    </style:style>
    <style:style style:name="P8" style:family="paragraph">
      <style:paragraph-properties fo:margin-top="0.42cm" fo:margin-bottom="0.35cm" fo:text-align="left"/>
      <style:text-properties fo:color="#000000" loext:opacity="100%" style:font-name="DejaVu Sans" fo:font-size="14pt" style:font-size-asian="10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000000" loext:opacity="100%" style:font-name="Fira Code SemiBold" fo:font-size="54pt" style:font-size-asian="10pt" style:font-size-complex="10pt"/>
    </style:style>
    <style:style style:name="P11" style:family="paragraph">
      <style:paragraph-properties fo:margin-top="0.42cm" fo:margin-bottom="0.35cm"/>
      <style:text-properties fo:color="#000000" loext:opacity="100%" style:font-name="Fira Code SemiBold1" fo:font-size="20pt" fo:font-weight="bold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.42cm" fo:margin-bottom="0.35cm"/>
      <style:text-properties fo:color="#000000" loext:opacity="100%" style:font-name="LM Sans Demi Cond 10" fo:font-size="14pt" style:font-size-asian="10pt" style:font-size-complex="10pt"/>
    </style:style>
    <style:style style:name="P14" style:family="paragraph">
      <style:paragraph-properties fo:margin-top="0.42cm" fo:margin-bottom="0.35cm"/>
      <style:text-properties fo:color="#000000" loext:opacity="100%" style:font-name="Fira Code SemiBold1" fo:font-size="2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000000" loext:opacity="100%" style:font-name="LM Sans Demi Cond 101" fo:font-size="15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fo:color="#000000" loext:opacity="100%" style:font-name="LM Sans Demi Cond 101" fo:font-size="14pt" style:font-size-asian="10pt" style:font-size-complex="10pt"/>
    </style:style>
    <style:style style:name="P17" style:family="paragraph">
      <style:paragraph-properties fo:margin-top="0.42cm" fo:margin-bottom="0.35cm"/>
      <style:text-properties fo:color="#000000" loext:opacity="100%" style:font-name="Fira Code SemiBold1" fo:font-size="40pt" style:font-size-asian="10pt" style:font-size-complex="10pt"/>
    </style:style>
    <style:style style:name="P18" style:family="paragraph">
      <style:paragraph-properties fo:margin-top="0.42cm" fo:margin-bottom="0.35cm"/>
      <style:text-properties fo:color="#000000" loext:opacity="100%" style:font-name="Fira Code SemiBold1" fo:font-size="40pt" fo:font-weight="bold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top="0.42cm" fo:margin-bottom="0.35cm"/>
      <style:text-properties fo:color="#000000" loext:opacity="100%" style:font-name="LM Sans Demi Cond 101" fo:font-size="16pt" style:font-size-asian="10pt" style:font-size-complex="10pt"/>
    </style:style>
    <style:style style:name="P21" style:family="paragraph">
      <style:paragraph-properties fo:margin-top="0.42cm" fo:margin-bottom="0.35cm" fo:text-align="left"/>
      <style:text-properties fo:color="#000000" loext:opacity="100%" style:font-name="DejaVu Sans" fo:font-size="12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" fo:font-size="15pt" fo:letter-spacing="normal" fo:language="es" fo:country="MX" fo:font-style="normal" fo:text-shadow="none" style:text-underline-style="none" fo:font-weight="bold" style:letter-kerning="true" fo:background-color="transparent" style:font-name-asian="Calibr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1" fo:font-size="15pt" fo:letter-spacing="normal" fo:language="es" fo:country="MX" fo:font-style="normal" fo:text-shadow="none" style:text-underline-style="none" fo:font-weight="bold" style:letter-kerning="true" fo:background-color="transparent" style:font-name-asian="Calibr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Demi Cond 101" fo:font-size="15pt" fo:letter-spacing="normal" fo:language="es" fo:country="MX" fo:font-style="normal" fo:text-shadow="none" style:text-underline-style="none" fo:font-weight="normal" style:letter-kerning="true" fo:background-color="transparent" style:font-name-asian="Calibr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Fira Code SemiBold1"/>
    </style:style>
    <style:style style:name="T5" style:family="text">
      <style:text-properties fo:color="#000000" loext:opacity="100%" style:font-name="DejaVu Sans" fo:font-size="13pt" style:font-size-asian="10pt" style:font-size-complex="10pt"/>
    </style:style>
    <style:style style:name="T6" style:family="text">
      <style:text-properties fo:color="#000000" loext:opacity="100%" style:font-name="DejaVu Sans" fo:font-size="14pt" style:font-size-asian="10pt" style:font-size-complex="10pt"/>
    </style:style>
    <style:style style:name="T7" style:family="text">
      <style:text-properties fo:color="#000000" loext:opacity="100%" style:font-name="Fira Code SemiBold" fo:font-size="54pt" style:font-size-asian="10pt" style:font-size-complex="10pt"/>
    </style:style>
    <style:style style:name="T8" style:family="text">
      <style:text-properties fo:color="#000000" loext:opacity="100%" style:font-name="Fira Code SemiBold1" fo:font-size="20pt" style:font-size-asian="10pt" style:font-size-complex="10pt"/>
    </style:style>
    <style:style style:name="T9" style:family="text">
      <style:text-properties fo:color="#000000" loext:opacity="100%" style:font-name="LM Sans Demi Cond 10" fo:font-size="14pt" style:font-size-asian="10pt" style:font-size-complex="10pt"/>
    </style:style>
    <style:style style:name="T10" style:family="text">
      <style:text-properties fo:color="#000000" loext:opacity="100%" style:font-name="LM Sans Demi Cond 101" fo:font-size="15pt" style:font-size-asian="10pt" style:font-size-complex="10pt"/>
    </style:style>
    <style:style style:name="T11" style:family="text">
      <style:text-properties fo:color="#000000" loext:opacity="100%" style:font-name="LM Sans Demi Cond 101" fo:font-size="14pt" style:font-size-asian="10pt" style:font-size-complex="10pt"/>
    </style:style>
    <style:style style:name="T12" style:family="text">
      <style:text-properties fo:color="#000000" loext:opacity="100%" style:font-name="Fira Code SemiBold1" fo:font-size="40pt" style:font-size-asian="10pt" style:font-size-complex="10pt"/>
    </style:style>
    <style:style style:name="T13" style:family="text">
      <style:text-properties fo:color="#000000" loext:opacity="100%" style:font-name="Fira Code SemiBold1" fo:font-size="40pt" fo:font-weight="bold" style:font-size-asian="10pt" style:font-size-complex="10pt"/>
    </style:style>
    <style:style style:name="T14" style:family="text">
      <style:text-properties fo:color="#000000" loext:opacity="100%" style:font-name="LM Sans Demi Cond 101" fo:font-size="16pt" style:font-size-asian="10pt" style:font-size-complex="10pt"/>
    </style:style>
    <style:style style:name="T15" style:family="text">
      <style:text-properties fo:color="#000000" loext:opacity="100%" style:font-name="Fira Code SemiBold1" fo:font-size="20pt" fo:font-weight="bold" style:font-size-asian="10pt" style:font-size-complex="10pt"/>
    </style:style>
    <style:style style:name="T16" style:family="text">
      <style:text-properties fo:color="#000000" loext:opacity="100%" style:font-name="DejaVu Sans" fo:font-size="12pt" style:font-size-asian="10pt" style:font-size-complex="10pt"/>
    </style:style>
    <style:style style:name="T17" style:family="text">
      <style:text-properties fo:color="#000000" loext:opacity="100%" style:font-name="DejaVu Sans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custom-shape draw:name="Rectangle 1" draw:style-name="gr1" draw:text-style-name="P2" draw:layer="layout" svg:width="10.625cm" svg:height="11.686cm" svg:x="9.02cm" svg:y="3.146cm">
          <text:p text:style-name="P1"><text:span text:style-name="T1">In</text:span><text:span text:style-name="T2">stituto Tecnológico Frontera Comalapa</text:span></text:p>
          <text:p text:style-name="P1"><text:span text:style-name="T2">Modalidad mixta</text:span></text:p>
          <text:p text:style-name="P1"><text:span text:style-name="T2">Ingeniería Sistemas Computacionales</text:span></text:p>
          <text:p text:style-name="P1"><text:span text:style-name="T3"/></text:p>
          <text:p text:style-name="P1"><text:span text:style-name="T2">Asignatura</text:span></text:p>
          <text:p text:style-name="P1"><text:span text:style-name="T3">Administración de bases de datos </text:span></text:p>
          <text:p text:style-name="P1"><text:span text:style-name="T2">Semestre</text:span></text:p>
          <text:p text:style-name="P1"><text:span text:style-name="T3">6to</text:span></text:p>
          <text:p text:style-name="P1"><text:span text:style-name="T2">Num.Control</text:span></text:p>
          <text:p text:style-name="P1"><text:span text:style-name="T3">231260058</text:span></text:p>
          <text:p text:style-name="P1"><text:span text:style-name="T2">Nombre del alumno</text:span></text:p>
          <text:p text:style-name="P1"><text:span text:style-name="T3">Daniel Osvaldo Silias Cardenas</text:span></text:p>
          <text:p text:style-name="P1"><text:span text:style-name="T2">Nombre Docente</text:span></text:p>
          <text:p text:style-name="P1"><text:span text:style-name="T3">ING. Francisco Javier Mingo Velázquez </text:span></text:p>
          <text:p text:style-name="P1"><text:span text:style-name="T2">Actividad</text:span></text:p>
          <text:p text:style-name="P1"><text:span text:style-name="T3">Reporte de Practica</text:span></text:p>
          <text:p text:style-name="P1"><text:span text:style-name="T2">Fecha de entrega</text:span></text:p>
          <text:p text:style-name="P1"><text:span text:style-name="T3">Frontera Comalapa, Chiapas a 13 Junio de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" draw:text-style-name="P3" draw:layer="layout" svg:width="14.996cm" svg:height="1.688cm" svg:x="6.52cm" svg:y="0.958cm">
          <draw:image xlink:href="Pictures/1000000000000508000000919C9F805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1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">
        <office:forms form:automatic-focus="false" form:apply-design-mode="false"/>
        <draw:frame presentation:style-name="pr2" draw:text-style-name="P5" draw:layer="layout" svg:width="26cm" svg:height="1.352cm" svg:x="1cm" svg:y="0.951cm" presentation:class="title" presentation:user-transformed="true">
          <draw:text-box>
            <text:p><text:span text:style-name="T4">INTRODUCCION</text:span></text:p>
          </draw:text-box>
        </draw:frame>
        <draw:frame presentation:style-name="pr3" draw:text-style-name="P7" draw:layer="layout" svg:width="26cm" svg:height="10.5cm" svg:x="1cm" svg:y="4.125cm" presentation:class="outline" presentation:user-transformed="true">
          <draw:text-box>
            <text:list text:style-name="L4">
              <text:list-header>
                <text:p text:style-name="P6"><text:span text:style-name="T5">En el presente reporte se detalla el proceso de diseño, desarrollo e integración de una arquitectura de software moderna basada en microservicios y contenedorización. El proyecto abarca desde la persistencia de datos y la exposición de servicios RESTful, hasta el desarrollo de una interfaz de usuario interactiva y su posterior despliegue.</text:span></text:p>
                <text:p text:style-name="P6"><text:span text:style-name="T5">A lo largo del documento se evidenciará la implementación de:</text:span></text:p>
              </text:list-header>
              <text:list-item>
                <text:p text:style-name="P6"><text:span text:style-name="T5">Backend: Microservicio desarrollado en Spring Boot (v4.1.0) conectado a una base de datos relacional.</text:span></text:p>
              </text:list-item>
              <text:list-item>
                <text:p text:style-name="P6"><text:span text:style-name="T5">Base de Datos: Contenedor aislado en MySQL gestionado mediante Docker.</text:span></text:p>
              </text:list-item>
              <text:list-item>
                <text:p text:style-name="P6"><text:span text:style-name="T5">Frontend: Aplicación desarrollada en Angular 18, estructurada de forma modular para el consumo de la API.</text:span></text:p>
              </text:list-item>
              <text:list-item>
                <text:p text:style-name="P6"><text:span text:style-name="T5">Despliegue/Producción: Estandarización de entornos mediante Docker Compose y empaquetado del frontend utilizando un servidor web de alto rendimiento (NGINX).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1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">
        <office:forms form:automatic-focus="false" form:apply-design-mode="false"/>
        <draw:frame presentation:style-name="pr4" draw:text-style-name="P5" draw:layer="layout" svg:width="14.8cm" svg:height="2cm" svg:x="6.6cm" svg:y="0.6cm" presentation:class="title" presentation:user-transformed="true">
          <draw:text-box>
            <text:p><text:span text:style-name="T4">JUSTIFICACION</text:span></text:p>
          </draw:text-box>
        </draw:frame>
        <draw:frame presentation:style-name="pr5" draw:text-style-name="P8" draw:layer="layout" svg:width="25.2cm" svg:height="10.548cm" svg:x="1.4cm" svg:y="3.8cm" presentation:class="outline" presentation:user-transformed="true">
          <draw:text-box>
            <text:list text:style-name="L4">
              <text:list-header>
                <text:p text:style-name="P6"><text:span text:style-name="T6">La adopción de esta arquitectura responde a la necesidad actual de construir sistemas escalables, modulares y desacoplados.</text:span></text:p>
              </text:list-header>
              <text:list-item>
                <text:p text:style-name="P6"><text:span text:style-name="T6">Independencia tecnológica: Separar el frontend y el backend permite que cada capa evolucione de manera autónoma.</text:span></text:p>
              </text:list-item>
              <text:list-item>
                <text:p text:style-name="P6"><text:span text:style-name="T6">Consistencia en el entorno: Gracias a Docker, se elimina el problema de "funciona en mi máquina", estandarizando el despliegue tanto de la base de datos como del servidor NGINX para producción.</text:span></text:p>
              </text:list-item>
              <text:list-item>
                <text:p text:style-name="P6"><text:span text:style-name="T6">Mantenimiento eficiente: La estructura de microservicios facilita la localización de fallos, pruebas unitarias y actualizaciones futuras sin comprometer todo el sistema.</text:span></text:p>
              </text:list-item>
              <text:list-item>
                <text:p text:style-name="P6"><text:span text:style-name="T6">Rendimiento optimizado: Servir el frontend compilado a través de NGINX garantiza tiempos de respuesta ultrarrápidos y bajo consumo de recursos en el servidor final.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2T1">
        <office:forms form:automatic-focus="false" form:apply-design-mode="false"/>
        <draw:frame presentation:style-name="pr7" draw:text-style-name="P10" draw:layer="layout" svg:width="14.8cm" svg:height="4.683cm" svg:x="6.5cm" svg:y="4.159cm" presentation:class="title" presentation:user-transformed="true">
          <draw:text-box>
            <text:p text:style-name="P9"><text:span text:style-name="T7">Entorno y Backend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Metropolis" presentation:presentation-page-layout-name="AL2T1">
        <office:forms form:automatic-focus="false" form:apply-design-mode="false"/>
        <draw:frame presentation:style-name="pr8" draw:text-style-name="P11" draw:layer="layout" svg:width="14.8cm" svg:height="2cm" svg:x="6.6cm" svg:y="0.6cm" presentation:class="title" presentation:user-transformed="true">
          <draw:text-box>
            <text:p text:style-name="P9"><text:span text:style-name="T8">Contenedor de Base de Datos</text:span></text:p>
          </draw:text-box>
        </draw:frame>
        <draw:frame draw:style-name="gr4" draw:text-style-name="P12" draw:layer="layout" svg:width="20.499cm" svg:height="3.499cm" svg:x="1.501cm" svg:y="4.5cm">
          <draw:image xlink:href="Pictures/100000000000078000000438403AFE24.png" xlink:type="simple" xlink:show="embed" xlink:actuate="onLoad" draw:mime-type="image/png">
            <text:p/>
          </draw:image>
        </draw:frame>
        <draw:frame draw:style-name="gr5" draw:text-style-name="P13" draw:layer="layout" svg:width="18.671cm" svg:height="0.729cm" svg:x="1.829cm" svg:y="9cm">
          <draw:text-box>
            <text:p text:style-name="P9"><text:span text:style-name="T9">Verificacion de que el contenedor de MySQL (db-mysql) esta activo y corriendo en el puerto correspondiente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Metropolis" presentation:presentation-page-layout-name="AL2T1">
        <office:forms form:automatic-focus="false" form:apply-design-mode="false"/>
        <draw:frame presentation:style-name="pr8" draw:text-style-name="P14" draw:layer="layout" svg:width="14.8cm" svg:height="2cm" svg:x="6.6cm" svg:y="0.6cm" presentation:class="title" presentation:user-transformed="true">
          <draw:text-box>
            <text:p text:style-name="P9"><text:span text:style-name="T8">Consola de Spring Boot</text:span></text:p>
          </draw:text-box>
        </draw:frame>
        <draw:frame draw:style-name="gr6" draw:text-style-name="P12" draw:layer="layout" svg:width="15.41cm" svg:height="8.668cm" svg:x="1.5cm" svg:y="4cm">
          <draw:image xlink:href="Pictures/10000000000007800000043874AA6871.png" xlink:type="simple" xlink:show="embed" xlink:actuate="onLoad" draw:mime-type="image/png">
            <text:p/>
          </draw:image>
        </draw:frame>
        <draw:frame draw:style-name="gr5" draw:text-style-name="P15" draw:layer="layout" svg:width="8cm" svg:height="0.729cm" svg:x="17.5cm" svg:y="8.5cm">
          <draw:text-box>
            <text:p text:style-name="P9"><text:span text:style-name="T10">Arranque exitoso del microservicio msvc-productos levantado en el puerto 8080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Metropolis" presentation:presentation-page-layout-name="AL2T1">
        <office:forms form:automatic-focus="false" form:apply-design-mode="false"/>
        <draw:frame presentation:style-name="pr8" draw:text-style-name="P14" draw:layer="layout" svg:width="14.8cm" svg:height="2cm" svg:x="6.6cm" svg:y="0.6cm" presentation:class="title" presentation:user-transformed="true">
          <draw:text-box>
            <text:p text:style-name="P9"><text:span text:style-name="T8">Prueba de la API REST</text:span></text:p>
          </draw:text-box>
        </draw:frame>
        <draw:frame draw:style-name="gr7" draw:text-style-name="P12" draw:layer="layout" svg:width="10.909cm" svg:height="6.937cm" svg:x="1.591cm" svg:y="4.5cm">
          <draw:image xlink:href="Pictures/100000000000078000000438F0621FEA.png" xlink:type="simple" xlink:show="embed" xlink:actuate="onLoad" draw:mime-type="image/png">
            <text:p/>
          </draw:image>
        </draw:frame>
        <draw:frame draw:style-name="gr5" draw:text-style-name="P16" draw:layer="layout" svg:width="12.514cm" svg:height="0.729cm" svg:x="13.5cm" svg:y="7.573cm">
          <draw:text-box>
            <text:p text:style-name="P9"><text:span text:style-name="T11">Y aca hacemos nuetsra Comprobacion de que el microservicio responde correctamente en formato JSON (mostrando el registro de ejemplo, como la Laptop Gamer).</text:span><text:span text:style-name="T11"><text:line-break/></text:span><text:span text:style-name="T11">usando el </text:span><text:span text:style-name="T11"><text:a xlink:href="http://localhost:8080/api/productos" xlink:type="simple">http://localhost:8080/api/productos</text:a></text:span></text:p>
            <text:p text:style-name="P9"><text:span text:style-name="T11"/></text:p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Metropolis" presentation:presentation-page-layout-name="AL2T1">
        <office:forms form:automatic-focus="false" form:apply-design-mode="false"/>
        <draw:frame presentation:style-name="pr10" draw:text-style-name="P17" draw:layer="layout" svg:width="14.8cm" svg:height="3.465cm" svg:x="6.327cm" svg:y="5.138cm" presentation:class="title" presentation:user-transformed="true">
          <draw:text-box>
            <text:p text:style-name="P9"><text:span text:style-name="T12">Frontend (Angular 18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Metropolis" presentation:presentation-page-layout-name="AL2T1">
        <office:forms form:automatic-focus="false" form:apply-design-mode="false"/>
        <draw:frame presentation:style-name="pr11" draw:text-style-name="P18" draw:layer="layout" svg:width="18.793cm" svg:height="3.465cm" svg:x="5.25cm" svg:y="-0.066cm" presentation:class="title" presentation:user-transformed="true">
          <draw:text-box>
            <text:p text:style-name="P9"><text:span text:style-name="T13">Generación del proyecto</text:span></text:p>
          </draw:text-box>
        </draw:frame>
        <draw:frame draw:style-name="gr6" draw:text-style-name="P12" draw:layer="layout" svg:width="15.092cm" svg:height="8.489cm" svg:x="0.741cm" svg:y="3.61cm">
          <draw:image xlink:href="Pictures/1000000000000780000004384CB2FCB7.png" xlink:type="simple" xlink:show="embed" xlink:actuate="onLoad" draw:mime-type="image/png">
            <text:p/>
          </draw:image>
        </draw:frame>
        <draw:frame draw:style-name="gr5" draw:text-style-name="P15" draw:layer="layout" svg:width="5.585cm" svg:height="0.729cm" svg:x="21.502cm" svg:y="6.901cm">
          <draw:text-box>
            <text:p text:style-name="P9"><text:span text:style-name="T10">Inicializacion y creacion de la estructura base de la aplicacion Angular.</text:span></text:p>
          </draw:text-box>
        </draw:frame>
        <draw:custom-shape draw:style-name="gr8" draw:text-style-name="P19" draw:layer="layout" svg:width="4.641cm" svg:height="0.567cm" svg:x="15.917cm" svg:y="7.2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Metropolis" presentation:presentation-page-layout-name="AL2T1">
        <office:forms form:automatic-focus="false" form:apply-design-mode="false"/>
        <draw:frame presentation:style-name="pr4" draw:text-style-name="P14" draw:layer="layout" svg:width="14.8cm" svg:height="2cm" svg:x="6.6cm" svg:y="0.6cm" presentation:class="title" presentation:user-transformed="true">
          <draw:text-box>
            <text:p text:style-name="P9"><text:span text:style-name="T8">Estructura de archivos y servicios</text:span></text:p>
          </draw:text-box>
        </draw:frame>
        <draw:frame draw:style-name="gr9" draw:text-style-name="P12" draw:layer="layout" svg:width="5.012cm" svg:height="15.749cm" svg:x="0.09cm" svg:y="0.062cm">
          <draw:image xlink:href="Pictures/1000000000000780000004389C24BFD2.png" xlink:type="simple" xlink:show="embed" xlink:actuate="onLoad" draw:mime-type="image/png">
            <text:p/>
          </draw:image>
        </draw:frame>
        <draw:frame draw:style-name="gr5" draw:text-style-name="P20" draw:layer="layout" svg:width="17.201cm" svg:height="0.729cm" svg:x="6.75cm" svg:y="6.061cm">
          <draw:text-box>
            <text:p text:style-name="P9"><text:span text:style-name="T14">Arquitectura modular del frontend, evidenciando la creación del servicio y componente de productos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Metropolis" presentation:presentation-page-layout-name="AL2T1">
        <office:forms form:automatic-focus="false" form:apply-design-mode="false"/>
        <draw:frame presentation:style-name="pr4" draw:text-style-name="P14" draw:layer="layout" svg:width="14.8cm" svg:height="2cm" svg:x="6.6cm" svg:y="0.6cm" presentation:class="title" presentation:user-transformed="true">
          <draw:text-box>
            <text:p text:style-name="P9"><text:span text:style-name="T8">Configuración del Dockerfile</text:span></text:p>
          </draw:text-box>
        </draw:frame>
        <draw:frame draw:style-name="gr10" draw:text-style-name="P12" draw:layer="layout" svg:width="11.233cm" svg:height="6.992cm" svg:x="0.295cm" svg:y="4.618cm">
          <draw:image xlink:href="Pictures/100000000000078000000438D9ABD64E.png" xlink:type="simple" xlink:show="embed" xlink:actuate="onLoad" draw:mime-type="image/png">
            <text:p/>
          </draw:image>
        </draw:frame>
        <draw:frame draw:style-name="gr5" draw:text-style-name="P15" draw:layer="layout" svg:width="13.373cm" svg:height="0.729cm" svg:x="13.839cm" svg:y="7.405cm">
          <draw:text-box>
            <text:p text:style-name="P9"><text:span text:style-name="T10">Definicion de la estrategia de empaquetado en dos fases (Node.js para compilacion y NGINX para el servidor web de produccion)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Metropolis" presentation:presentation-page-layout-name="AL2T1">
        <office:forms form:automatic-focus="false" form:apply-design-mode="false"/>
        <draw:frame presentation:style-name="pr4" draw:text-style-name="P14" draw:layer="layout" svg:width="14.8cm" svg:height="2cm" svg:x="6.6cm" svg:y="0.6cm" presentation:class="title" presentation:user-transformed="true">
          <draw:text-box>
            <text:p text:style-name="P9"><text:span text:style-name="T8">Compilación en desarrollo</text:span></text:p>
          </draw:text-box>
        </draw:frame>
        <draw:frame draw:style-name="gr11" draw:text-style-name="P12" draw:layer="layout" svg:width="13.501cm" svg:height="7.979cm" svg:x="0.441cm" svg:y="3.296cm">
          <draw:image xlink:href="Pictures/1000000000000780000004386AAFB93F.png" xlink:type="simple" xlink:show="embed" xlink:actuate="onLoad" draw:mime-type="image/png">
            <text:p/>
          </draw:image>
        </draw:frame>
        <draw:frame draw:style-name="gr5" draw:text-style-name="P15" draw:layer="layout" svg:width="9.988cm" svg:height="0.729cm" svg:x="15.707cm" svg:y="7.384cm">
          <draw:text-box>
            <text:p text:style-name="P9"><text:span text:style-name="T10">Y ejecutamos nuestro proyecto con el comando npx ng serve y la Compilacion y puesta en marcha del entorno de desarrollo en el puerto 4200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Metropolis" presentation:presentation-page-layout-name="AL2T1">
        <office:forms form:automatic-focus="false" form:apply-design-mode="false"/>
        <draw:frame presentation:style-name="pr4" draw:text-style-name="P11" draw:layer="layout" svg:width="14.8cm" svg:height="2cm" svg:x="6.6cm" svg:y="0.6cm" presentation:class="title" presentation:user-transformed="true">
          <draw:text-box>
            <text:p text:style-name="P9"><text:span text:style-name="T15">Resultado final en el navegador</text:span></text:p>
          </draw:text-box>
        </draw:frame>
        <draw:frame draw:style-name="gr5" draw:text-style-name="P15" draw:layer="layout" svg:width="10.947cm" svg:height="0.729cm" svg:x="12.942cm" svg:y="6.557cm">
          <draw:text-box>
            <text:p text:style-name="P9"><text:span text:style-name="T10">Demostración de la interfaz gráfica funcional, mostrando la tabla con los datos reales consumidos desde el microservicio de Spring Boot.</text:span></text:p>
          </draw:text-box>
        </draw:frame>
        <draw:frame draw:style-name="gr12" draw:text-style-name="P12" draw:layer="layout" svg:width="7.699cm" svg:height="3.747cm" svg:x="2.291cm" svg:y="4.676cm">
          <draw:image xlink:href="Pictures/10000000000007800000043867A197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Metropolis" presentation:presentation-page-layout-name="AL2T1">
        <office:forms form:automatic-focus="false" form:apply-design-mode="false"/>
        <draw:frame presentation:style-name="pr8" draw:text-style-name="P5" draw:layer="layout" svg:width="14.8cm" svg:height="2cm" svg:x="6.6cm" svg:y="0.6cm" presentation:class="title" presentation:user-transformed="true">
          <draw:text-box>
            <text:p><text:span text:style-name="T4">CONCLUSION</text:span></text:p>
          </draw:text-box>
        </draw:frame>
        <draw:frame presentation:style-name="pr12" draw:text-style-name="P21" draw:layer="layout" svg:width="25.2cm" svg:height="10.548cm" svg:x="1.4cm" svg:y="3.8cm" presentation:class="outline" presentation:user-transformed="true">
          <draw:text-box>
            <text:list text:style-name="L4">
              <text:list-item>
                <text:p text:style-name="P6"><text:span text:style-name="T16">Integración exitosa: Se logró la comunicación de extremo a extremo (End-to-End) donde la interfaz en Angular consume y renderiza correctamente los datos expuestos por la API de Spring Boot.</text:span></text:p>
              </text:list-item>
              <text:list-item>
                <text:p text:style-name="P6"><text:span text:style-name="T16">Estandarización lograda: El uso de Docker Desktop y Docker Compose permitió orquestar los contenedores (base de datos y microservicio) de forma limpia, resolviendo los problemas iniciales de resolución de red y puertos locales.</text:span></text:p>
              </text:list-item>
              <text:list-item>
                <text:p text:style-name="P6"><text:span text:style-name="T16">Despliegue profesional: El empaquetado de la aplicación frontend mediante un Dockerfile de múltiples etapas (Multi-stage build) con NGINX asegura que la aplicación esté lista para producción.</text:span></text:p>
              </text:list-item>
              <text:list-item>
                <text:p text:style-name="P6"><text:span text:style-name="T16">Crecimiento profesional: La práctica reforzó habilidades avanzadas en gestión de dependencias (Maven), mapeo objeto-relacional (JPA/Hibernate) y buenas prácticas de DevOps en el ciclo de vida del software.</text:span></text:p>
              </text:list-item>
              <text:list-item>
                <text:p text:style-name="P6"><text:span text:style-name="T17">4. Fuentes de Información / Referencias</text:span></text:p>
              </text:list-item>
              <text:list-item>
                <text:p text:style-name="P6"><text:span text:style-name="T16">Spring Boot Documentation. (2026). Spring Data JPA &amp; Spring Web Reference. Obtenido de la documentación oficial de Spring: </text:span><text:span text:style-name="T16"><text:a xlink:href="https://spring.io/" xlink:type="simple">spring.io</text:a></text:span></text:p>
              </text:list-item>
              <text:list-item>
                <text:p text:style-name="P6"><text:span text:style-name="T16">Angular Documentation. (2026). Angular 18: Getting Started &amp; Components. Obtenido de la documentación oficial de Angular: </text:span><text:span text:style-name="T16"><text:a xlink:href="https://angular.io/" xlink:type="simple">angular.io</text:a></text:span></text:p>
              </text:list-item>
              <text:list-item>
                <text:p text:style-name="P6"><text:span text:style-name="T16">Docker Documentation. (2026). Docker Compose Overview &amp; Dockerfile reference. Obtenido de la documentación oficial de Docker: </text:span><text:span text:style-name="T16"><text:a xlink:href="https://www.docker.com/" xlink:type="simple">docker.com</text:a></text:span></text:p>
              </text:list-item>
              <text:list-item>
                <text:p text:style-name="P6"><text:span text:style-name="T16">NGINX Docs. (2026). Serving Static Content &amp; NGINX Alpine Docker. Obtenido de la documentación oficial de NGINX: </text:span><text:span text:style-name="T16"><text:a xlink:href="https://nginx.org/" xlink:type="simple">nginx.org</text:a></text:span></text:p>
              </text:list-item>
              <text:list-item>
                <text:p text:style-name="P6"><text:span text:style-name="T16">ANEXO ENLACE AL REPOSITORIO</text:span></text:p>
              </text:list-item>
              <text:list-item>
                <text:p text:style-name="P6"><text:span text:style-name="T16"><text:a xlink:href="https://github.com/danielsilias/ABD-TEMA-6.git" xlink:type="simple">https://github.com/danielsilias/ABD-TEMA-6.git</text:a></text:span></text:p>
              </text:list-item>
              <text:list-item>
                <text:p text:style-name="P6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DejaVu Sans" svg:font-family="'DejaVu Sans'" style:font-family-generic="swiss" style:font-pitch="variable"/>
    <style:font-face style:name="Fira Code SemiBold" svg:font-family="'Fira Code SemiBold'" style:font-pitch="fixed"/>
    <style:font-face style:name="Fira Code SemiBold1" svg:font-family="'Fira Code SemiBold'" style:font-adornments="Regular" style:font-pitch="fixed"/>
    <style:font-face style:name="FreeSans" svg:font-family="FreeSans" style:font-family-generic="system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s" fo:country="MX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fo:font-size="31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etropolis-backgroundobjects">
      <style:graphic-properties draw:fill="none" draw:fill-color="#ffffff" fo:min-height="0.674cm" loext:decorative="false"/>
      <style:paragraph-properties style:writing-mode="lr-tb"/>
    </style:style>
    <style:style style:name="Mpr14" style:family="presentation" style:parent-style-name="Metropolis-backgroundobjects">
      <style:graphic-properties draw:fill="none" draw:fill-color="#ffffff" fo:min-height="1.396cm" loext:decorative="false"/>
      <style:paragraph-properties style:writing-mode="lr-tb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Metropolis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13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C2CB87FC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7" draw:text-style-name="MP9" draw:layer="backgroundobjects" svg:width="25.2cm" svg:height="10.548cm" svg:x="1.4cm" svg:y="3.8cm">
        <draw:text-box>
          <text:p/>
        </draw:text-box>
      </draw:frame>
      <draw:frame presentation:style-name="Mpr13" draw:text-style-name="MP15" draw:layer="backgroundobjects" svg:width="6.523cm" svg:height="0.674cm" svg:x="1.4cm" svg:y="14.8cm" presentation:class="date-time">
        <draw:text-box>
          <text:p text:style-name="MP14"><text:span text:style-name="MT1"><presentation:date-time/></text:span></text:p>
        </draw:text-box>
      </draw:frame>
      <draw:frame presentation:style-name="Mpr13" draw:text-style-name="MP17" draw:layer="backgroundobjects" svg:width="8.875cm" svg:height="0.674cm" svg:x="9.576cm" svg:y="14.8cm" presentation:class="footer">
        <draw:text-box>
          <text:p text:style-name="MP16"><text:span text:style-name="MT1"><presentation:footer/></text:span></text:p>
        </draw:text-box>
      </draw:frame>
      <draw:frame presentation:style-name="Mpr13" draw:text-style-name="MP4" draw:layer="backgroundobjects" svg:width="6.523cm" svg:height="0.674cm" svg:x="20.076cm" svg:y="14.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14" draw:text-style-name="MP15" draw:layer="backgroundobjects" svg:width="9.369cm" svg:height="1.396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15" draw:layer="backgroundobjects" svg:width="9.369cm" svg:height="1.397cm" svg:x="0cm" svg:y="26.543cm" presentation:class="footer">
          <draw:text-box>
            <text:p text:style-name="MP14"><text:span text:style-name="MT3"><presentation:footer/></text:span></text:p>
          </draw:text-box>
        </draw:frame>
        <draw:frame presentation:style-name="Mpr15" draw:text-style-name="MP4" draw:layer="backgroundobjects" svg:width="9.369cm" svg:height="1.397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21:52:55.410813945</meta:creation-date>
    <dc:description>This work is licensed under a Creative Commons 0 License.
It makes use of the works of Jun NOGATA.</dc:description>
    <meta:generator>LibreOffice/26.2.2.2$Linux_X86_64 LibreOffice_project/620$Build-2</meta:generator>
    <dc:title>Midnightblue</dc:title>
    <meta:editing-duration>PT24M47S</meta:editing-duration>
    <meta:editing-cycles>4</meta:editing-cycles>
    <dc:date>2026-06-11T23:52:36.613766472</dc:date>
    <meta:document-statistic meta:object-count="126"/>
  </office:meta>
</office:document-meta>
</file>