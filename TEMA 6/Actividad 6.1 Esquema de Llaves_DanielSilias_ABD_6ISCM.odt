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0000004000A8F4539.png" manifest:media-type="image/png"/>
  <manifest:file-entry manifest:full-path="Pictures/10000001000000650000082FC3CE3779.png" manifest:media-type="image/png"/>
  <manifest:file-entry manifest:full-path="Pictures/100000010000019F0000005D50546201.png" manifest:media-type="image/png"/>
  <manifest:file-entry manifest:full-path="Pictures/10000001000001200000008D554B0807.png" manifest:media-type="image/png"/>
  <manifest:file-entry manifest:full-path="Pictures/100000000000005B000000409077DEB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Sans Demi Cond 10" svg:font-family="'LM Sans Demi Cond 10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0d3bf2" style:font-size-asian="20pt" style:font-size-complex="20pt"/>
    </style:style>
    <style:style style:name="P2" style:family="paragraph">
      <loext:graphic-properties draw:fill="none"/>
      <style:paragraph-properties fo:text-align="left"/>
      <style:text-properties fo:font-size="18pt"/>
    </style:style>
    <style:style style:name="P3" style:family="paragraph" style:parent-style-name="Standard">
      <style:paragraph-properties fo:text-align="center" style:justify-single-word="false"/>
      <style:text-properties style:font-name="LM Sans Demi Cond 10" fo:font-size="20pt" officeooo:paragraph-rsid="000d3bf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LM Sans Demi Cond 10" fo:font-size="20pt" officeooo:rsid="000d3bf2" officeooo:paragraph-rsid="000d3bf2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LM Sans Demi Cond 10" fo:font-size="20pt" officeooo:rsid="00042595" officeooo:paragraph-rsid="000d3bf2" style:font-size-asian="20pt" style:font-size-complex="20pt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3">
      <style:paragraph-properties fo:text-align="justify" style:justify-single-word="false" fo:break-before="pag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family="'Arial Black'" style:font-family-generic="swiss" style:font-pitch="variable" fo:font-size="12pt" style:font-size-asian="12pt" style:font-size-complex="12pt"/>
    </style:style>
    <style:style style:name="T2" style:family="text">
      <style:text-properties officeooo:rsid="000d3bf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loext:decorative="false" fo:margin-left="0cm" fo:margin-right="0cm" fo:margin-top="0cm" fo:margin-bottom="0.004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 42" text:anchor-type="char" svg:x="14.845cm" svg:y="-1.759cm" svg:width="3.796cm" svg:height="2.42cm" draw:z-index="0"><draw:image xlink:href="Pictures/100000000000005B000000409077DEB7.jpg" xlink:type="simple" xlink:show="embed" xlink:actuate="onLoad" draw:mime-type="image/jpeg"/></draw:frame><draw:frame draw:style-name="fr1" draw:name="Imagen 41" text:anchor-type="char" svg:x="8.045cm" svg:y="-1.663cm" svg:width="4.905cm" svg:height="2.387cm" draw:z-index="1"><draw:image xlink:href="Pictures/10000001000001200000008D554B0807.png" xlink:type="simple" xlink:show="embed" xlink:actuate="onLoad" draw:mime-type="image/png"/></draw:frame><draw:g text:anchor-type="char" draw:z-index="2" draw:name="Grupo 38" draw:style-name="gr1"><draw:frame draw:name="4 2" draw:style-name="gr2" draw:text-style-name="P2" svg:width="6.053cm" svg:height="1.733cm" svg:x="0.559cm" svg:y="-1.392cm"><draw:image xlink:href="Pictures/100000010000019F0000005D50546201.png" xlink:type="simple" xlink:show="embed" xlink:actuate="onLoad" draw:mime-type="image/png"><text:p/></draw:image></draw:frame><draw:frame draw:name="3 2" draw:style-name="gr3" draw:text-style-name="P2" svg:width="0.473cm" svg:height="0.126cm" svg:x="-2.016cm" svg:y="1.178cm"><draw:image xlink:href="Pictures/10000001000000650000082FC3CE3779.png" xlink:type="simple" xlink:show="embed" xlink:actuate="onLoad" draw:mime-type="image/png"><text:p/></draw:image></draw:frame></draw:g></text:p>
      <text:p text:style-name="P3"/>
      <text:p text:style-name="P3" loext:marker-style-name="T1">INSTITUTO TECNOLÓGICO DE FRONTERA COMALAPA</text:p>
      <text:p text:style-name="P3" loext:marker-style-name="T1">Ingeniería sistemas computacionales</text:p>
      <text:p text:style-name="P3" loext:marker-style-name="T1">Semestre</text:p>
      <text:p text:style-name="P3" loext:marker-style-name="T1"><text:s/>6°</text:p>
      <text:p text:style-name="P3" loext:marker-style-name="T1">Actividad</text:p>
      <text:p text:style-name="P4" loext:marker-style-name="T1">Esquema de Llaves</text:p>
      <text:p text:style-name="P3" loext:marker-style-name="T1">Alumno</text:p>
      <text:p text:style-name="P3" loext:marker-style-name="T1">Daniel osvaldo silias cárdenas</text:p>
      <text:p text:style-name="P3" loext:marker-style-name="T1">Docente</text:p>
      <text:p text:style-name="P5" loext:marker-style-name="T1">Francisco Javier Mingo Velazquez</text:p>
      <text:p text:style-name="P3" loext:marker-style-name="T1">No. Control </text:p>
      <text:p text:style-name="P3" loext:marker-style-name="T1">231260058</text:p>
      <text:p text:style-name="P3" loext:marker-style-name="T1"><text:span text:style-name="T2">12</text:span>/0<text:span text:style-name="T2">6</text:span>/202<text:span text:style-name="T2">6</text:span></text:p>
      <text:h text:style-name="P6" text:outline-level="3">Introducción</text:h>
      <text:p text:style-name="P7">El monitoreo y la auditoría son procesos fundamentales dentro de la administración de sistemas, organizaciones y bases de datos, ya que permiten verificar el cumplimiento de objetivos, normas y procedimientos establecidos. El monitoreo se enfoca en el seguimiento continuo de actividades y procesos para detectar desviaciones y tomar acciones oportunas, mientras que la auditoría evalúa de manera independiente y documentada la eficacia, el cumplimiento y la confiabilidad de dichos procesos. Ambos mecanismos contribuyen al control interno, la mejora continua y la toma de decisiones basadas en evidencias.</text:p>
      <text:p text:style-name="P8"/>
      <text:h text:style-name="P6" text:outline-level="3">Justificación</text:h>
      <text:p text:style-name="P7">El estudio del monitoreo y la auditoría es de gran importancia dentro de la administración de sistemas, bases de datos y organizaciones, debido a que estas actividades permiten garantizar el correcto funcionamiento de los procesos y el cumplimiento de los objetivos establecidos. En un entorno donde la información constituye uno de los recursos más valiosos, es necesario contar con mecanismos que permitan supervisar constantemente las operaciones y verificar que se desarrollen de manera eficiente, segura y conforme a las políticas institucionales.</text:p>
      <text:p text:style-name="P7">La elaboración de un esquema de llaves sobre este tema facilita la organización y comprensión de los conceptos fundamentales, permitiendo identificar de forma clara la relación entre el monitoreo y la auditoría, sus características, objetivos, etapas y beneficios. Asimismo, contribuye al desarrollo de habilidades de análisis y síntesis de información, ya que requiere seleccionar los aspectos más relevantes del tema y representarlos de manera estructurada.</text:p>
      <text:p text:style-name="P7">Por otra parte, el monitoreo ayuda a detectar oportunamente fallas, riesgos o desviaciones en los procesos, permitiendo aplicar medidas correctivas antes de que se conviertan en problemas mayores. La auditoría, por su parte, proporciona una evaluación objetiva e independiente que permite determinar si los controles implementados son adecuados y si las actividades se realizan conforme a las normas y procedimientos establecidos.</text:p>
      <text:p text:style-name="P7"/>
      <text:p text:style-name="P9"><draw:frame draw:style-name="fr2" draw:name="Imagen1" text:anchor-type="char" svg:x="-2.018cm" svg:y="4.022cm" svg:width="21.551cm" svg:height="14.367cm" draw:z-index="3"><draw:image xlink:href="Pictures/1000000000000600000004000A8F4539.png" xlink:type="simple" xlink:show="embed" xlink:actuate="onLoad" draw:mime-type="image/png"/></draw:frame></text:p>
      <text:h text:style-name="P10" text:outline-level="3">Conclusión</text:h>
      <text:p text:style-name="P7">En conclusión, el monitoreo y la auditoría son herramientas complementarias que permiten supervisar, evaluar y mejorar continuamente los procesos organizacionales y tecnológicos. El monitoreo aporta información en tiempo real para la toma de decisiones oportunas, mientras que la auditoría proporciona una evaluación objetiva del cumplimiento y la eficacia de los controles establecidos. La aplicación adecuada de ambos procesos contribuye a reducir riesgos, optimizar recursos y garantizar la confiabilidad y seguridad de la información y de las operaciones de una organización.</text:p>
      <text:h text:style-name="P11" text:outline-level="3">Fuentes de información</text:h>
      <text:list text:style-name="L1">
        <text:list-item>
          <text:p text:style-name="P12">ISO 19011:2018. Directrices para la auditoría de sistemas de gestión. Organización Internacional de Normalización (ISO).</text:p>
        </text:list-item>
        <text:list-item>
          <text:p text:style-name="P12">Laudon, K. C., &amp; Laudon, J. P. (2021). Sistemas de información gerencial (16.ª ed.). Pearson.</text:p>
        </text:list-item>
        <text:list-item>
          <text:p text:style-name="P12">Silberschatz, A., Korth, H. F., &amp; Sudarshan, S. (2020). Fundamentos de bases de datos (7.ª ed.). McGraw-Hill.</text:p>
        </text:list-item>
        <text:list-item>
          <text:p text:style-name="P12">Stallings, W. (2018). Seguridad informática: principios y práctica (4.ª ed.). Pearson.</text:p>
        </text:list-item>
        <text:list-item>
          <text:p text:style-name="P12">ISACA. IT Audit Framework and Guidelines. Recuperado de https://www.isaca.org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Sans Demi Cond 10" svg:font-family="'LM Sans Demi Cond 10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1T21:43:20.917191133</meta:creation-date>
    <dc:date>2026-06-11T21:49:35.857720265</dc:date>
    <meta:editing-duration>PT6M15S</meta:editing-duration>
    <meta:editing-cycles>1</meta:editing-cycles>
    <meta:document-statistic meta:table-count="0" meta:image-count="3" meta:object-count="0" meta:page-count="5" meta:paragraph-count="27" meta:word-count="480" meta:character-count="3399" meta:non-whitespace-character-count="2949"/>
    <meta:generator>LibreOffice/26.2.2.2$Linux_X86_64 LibreOffice_project/620$Build-2</meta:generator>
  </office:meta>
</office:document-meta>
</file>