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98C3CCA.png" manifest:media-type="image/png"/>
  <manifest:file-entry manifest:full-path="Pictures/1000000000000780000004389B601516.png" manifest:media-type="image/png"/>
  <manifest:file-entry manifest:full-path="Pictures/10000000000007800000043895AD1CBB.png" manifest:media-type="image/png"/>
  <manifest:file-entry manifest:full-path="Pictures/10000000000007800000043860954AA5.png" manifest:media-type="image/png"/>
  <manifest:file-entry manifest:full-path="Pictures/1000000000000508000000919C9F805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modern" style:font-pitch="fixed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Fira Code SemiBold" svg:font-family="'Fira Code SemiBold'" style:font-pitch="fixed"/>
    <style:font-face style:name="FreeSans" svg:font-family="FreeSans" style:font-family-generic="system" style:font-pitch="variable"/>
    <style:font-face style:name="LM Sans Demi Cond 10" svg:font-family="'LM Sans Demi Cond 10'" style:font-adornments="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draw:shadow="hidden" draw:shadow-offset-x="0.2cm" draw:shadow-offset-y="0.2cm" draw:shadow-color="#808080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Object_20_with_20_no_20_fill_20_and_20_no_20_line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808cm, 0cm, 0cm, 1.714cm)" draw:image-opacity="100%" style:mirror="none" loext:decorative="false"/>
    </style:style>
    <style:style style:name="gr5" style:family="graphic" style:parent-style-name="standard">
      <style:graphic-properties draw:stroke="none" draw:fill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2cm, 11.892cm, 5.025cm, 11.692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7cm, 8.263cm, 11.415cm, 6.249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45cm, 8.263cm, 7.786cm, 6.25cm)" draw:image-opacity="100%" style:mirror="none" loext:decorative="false"/>
    </style:style>
    <style:style style:name="pr1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3" style:family="presentation" style:parent-style-name="DNA-outline1">
      <style:graphic-properties draw:textarea-horizontal-align="justify" fo:min-height="0.101cm" loext:decorative="false"/>
      <style:paragraph-properties style:writing-mode="lr-tb"/>
    </style:style>
    <style:style style:name="pr4" style:family="presentation" style:parent-style-name="DNA-title">
      <style:graphic-properties fo:min-height="2.63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3.171cm" loext:decorative="false"/>
      <style:paragraph-properties style:writing-mode="lr-tb"/>
    </style:style>
    <style:style style:name="pr6" style:family="presentation" style:parent-style-name="DNA-title">
      <style:graphic-properties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M Sans Demi Cond 101" fo:font-size="15pt" fo:font-style="normal" fo:text-shadow="none" style:text-underline-style="none" fo:font-weight="normal" style:letter-kerning="true" style:font-name-asian="Noto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M Sans Demi Cond 101" fo:font-size="15pt" fo:font-style="normal" fo:text-shadow="none" style:text-underline-style="none" fo:font-weight="normal" style:letter-kerning="true" style:font-name-asian="Noto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lef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6" style:family="paragraph">
      <style:paragraph-properties fo:text-align="justify"/>
    </style:style>
    <style:style style:name="P7" style:family="paragraph">
      <style:paragraph-properties fo:margin-top="0.42cm" fo:margin-bottom="0.35cm"/>
      <style:text-properties style:font-name="Fira Code SemiBold" fo:font-size="2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style:font-name="LM Sans Demi Cond 101" fo:font-size="13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style:font-name="LM Sans Demi Cond 101" fo:font-size="13pt" style:font-size-asian="10pt" style:font-size-complex="10pt"/>
    </style:style>
    <style:style style:name="P11" style:family="paragraph">
      <style:paragraph-properties fo:margin-top="0.42cm" fo:margin-bottom="0.35cm" fo:text-align="left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lef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Demi Cond 101" fo:font-size="15pt" fo:letter-spacing="normal" fo:language="es" fo:country="MX" fo:font-style="normal" fo:text-shadow="none" style:text-underline-style="none" fo:font-weight="bold" style:letter-kerning="true" fo:background-color="transparent" style:font-name-asian="Calibr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Demi Cond 10" fo:font-size="15pt" fo:letter-spacing="normal" fo:language="es" fo:country="MX" fo:font-style="normal" fo:text-shadow="none" style:text-underline-style="none" fo:font-weight="bold" style:letter-kerning="true" fo:background-color="transparent" style:font-name-asian="Calibr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Demi Cond 10" fo:font-size="15pt" fo:letter-spacing="normal" fo:language="es" fo:country="MX" fo:font-style="normal" fo:text-shadow="none" style:text-underline-style="none" fo:font-weight="normal" style:letter-kerning="true" fo:background-color="transparent" style:font-name-asian="Calibr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name="Rectangle 1" draw:style-name="gr1" draw:text-style-name="P2" draw:layer="layout" svg:width="10.625cm" svg:height="11.686cm" svg:x="9cm" svg:y="3cm">
          <text:p text:style-name="P1"><text:span text:style-name="T1">In</text:span><text:span text:style-name="T2">stituto Tecnológico Frontera Comalapa</text:span></text:p>
          <text:p text:style-name="P1"><text:span text:style-name="T2">Modalidad mixta</text:span></text:p>
          <text:p text:style-name="P1"><text:span text:style-name="T2">Ingeniería Sistemas Computacionales</text:span></text:p>
          <text:p text:style-name="P1"><text:span text:style-name="T3"/></text:p>
          <text:p text:style-name="P1"><text:span text:style-name="T2">Asignatura</text:span></text:p>
          <text:p text:style-name="P1"><text:span text:style-name="T3">Administración de bases de datos </text:span></text:p>
          <text:p text:style-name="P1"><text:span text:style-name="T2">Semestre</text:span></text:p>
          <text:p text:style-name="P1"><text:span text:style-name="T3">6to</text:span></text:p>
          <text:p text:style-name="P1"><text:span text:style-name="T2">Num.Control</text:span></text:p>
          <text:p text:style-name="P1"><text:span text:style-name="T3">231260058</text:span></text:p>
          <text:p text:style-name="P1"><text:span text:style-name="T2">Nombre del alumno</text:span></text:p>
          <text:p text:style-name="P1"><text:span text:style-name="T3">Daniel Osvaldo Silias Cardenas</text:span></text:p>
          <text:p text:style-name="P1"><text:span text:style-name="T2">Nombre Docente</text:span></text:p>
          <text:p text:style-name="P1"><text:span text:style-name="T3">ING. Francisco Javier Mingo Velázquez </text:span></text:p>
          <text:p text:style-name="P1"><text:span text:style-name="T2">Actividad</text:span></text:p>
          <text:p text:style-name="P1"><text:span text:style-name="T3">Banco de Ejercicios</text:span></text:p>
          <text:p text:style-name="P1"><text:span text:style-name="T2">Fecha de entrega</text:span></text:p>
          <text:p text:style-name="P1"><text:span text:style-name="T3">Frontera Comalapa, Chiapas a 14 Junio de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2" draw:text-style-name="P3" draw:layer="layout" svg:width="14.996cm" svg:height="1.688cm" svg:x="6.5cm" svg:y="0.812cm">
          <draw:image xlink:href="Pictures/1000000000000508000000919C9F805E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1" presentation:class="page"/>
          <draw:frame presentation:style-name="pr1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INTRODUCCION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4">
              <text:list-header>
                <text:p text:style-name="P5">En esta sección se detalla la evolución y mejora de la aplicación web, transformando un servicio de persistencia básico en un Banco de Ejercicios o Catálogo de Productos interactivo. El proyecto demuestra la capacidad de poblar múltiples registros de manera automatizada en el servidor y renderizarlos dinámicamente en la interfaz de usuario.</text:p>
                <text:p text:style-name="P5">A lo largo de este apartado se evidencia la integración de:</text:p>
              </text:list-header>
              <text:list-item>
                <text:p text:style-name="P5">Carga masiva inicial: Inserción de múltiples registros (como una Laptop, Mouse, Teclado y Monitor) con descripciones detalladas y precios mediante un componente de inicialización en el backend.</text:p>
              </text:list-item>
              <text:list-item>
                <text:p text:style-name="P5">Interfaz de usuario responsiva: Visualización del catálogo a través de un diseño en tarjetas (Cards) estilizado con librerías CSS externas.</text:p>
              </text:list-item>
              <text:list-item>
                <text:p text:style-name="P5">Interactividad cliente-servidor: Consumo de la API y manejo de eventos para mostrar información a detalle de cada ítem seleccionado por el usuari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2" presentation:class="page"/>
          <draw:frame presentation:style-name="pr1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>
        <office:forms form:automatic-focus="false" form:apply-design-mode="false"/>
        <draw:frame presentation:style-name="pr4" draw:layer="layout" svg:width="18.313cm" svg:height="2.63cm" svg:x="4.903cm" svg:y="0.627cm" presentation:class="title" presentation:user-transformed="true">
          <draw:text-box>
            <text:p>JUSTIFICACION</text:p>
          </draw:text-box>
        </draw:frame>
        <draw:frame presentation:style-name="pr3" draw:text-style-name="P6" draw:layer="layout" svg:width="18.313cm" svg:height="10.147cm" svg:x="4.903cm" svg:y="3.685cm" presentation:class="outline" presentation:user-transformed="true">
          <draw:text-box>
            <text:list text:style-name="L4">
              <text:list-header>
                <text:p text:style-name="P5">La implementación de un banco de datos e ítems con visualización interactiva responde a la necesidad de validar el correcto funcionamiento de la arquitectura bajo condiciones reales de densidad de información.</text:p>
              </text:list-header>
              <text:list-item>
                <text:p text:style-name="P5">Experiencia de usuario (UX): El uso de tarjetas (cards) y un diseño estético mejora significativamente la presentación de los datos en comparación con las tablas tradicionales.</text:p>
              </text:list-item>
              <text:list-item>
                <text:p text:style-name="P5">Interactividad en tiempo real: La funcionalidad implementada en el botón "Ver Detalle" permite verificar que el Frontend procesa correctamente los objetos individuales directamente desde el arreglo cargado por la API.</text:p>
              </text:list-item>
              <text:list-item>
                <text:p text:style-name="P5">Eficiencia en pruebas: La inicialización automática de datos evita la inserción manual repetitiva, facilitando el desarrollo rápido y las demostraciones funcionales del proyec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3" presentation:class="page"/>
          <draw:frame presentation:style-name="pr1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3T3">
        <office:forms form:automatic-focus="false" form:apply-design-mode="false"/>
        <draw:frame presentation:style-name="pr2" draw:text-style-name="P7" draw:layer="layout" svg:width="22.5cm" svg:height="2.6cm" svg:x="4.5cm" svg:y="0.6cm" presentation:class="title">
          <draw:text-box>
            <text:p text:style-name="P7">Carga masiva de datos en la consola (Backend)</text:p>
          </draw:text-box>
        </draw:frame>
        <draw:frame draw:style-name="gr4" draw:text-style-name="P8" draw:layer="layout" svg:width="10.979cm" svg:height="6.175cm" svg:x="4.021cm" svg:y="4.5cm" presentation:class="graphic" presentation:user-transformed="true">
          <draw:image xlink:href="Pictures/10000000000007800000043860954AA5.png" xlink:type="simple" xlink:show="embed" xlink:actuate="onLoad" draw:mime-type="image/png">
            <text:p/>
          </draw:image>
        </draw:frame>
        <draw:frame draw:style-name="gr5" draw:text-style-name="P10" draw:layer="layout" svg:width="24cm" svg:height="1.072cm" svg:x="4cm" svg:y="12cm">
          <draw:text-box>
            <text:p text:style-name="P9">Evidencia que la aplicación inicializa correctamente y ejecuta el CommandLineRunner realizando la inserción automática de múltiples registros (Laptop Gamer, Mouse, Teclado, Monitor) con sus respectivas descripciones y precios en la base de datos.</text:p>
          </draw:text-box>
        </draw:frame>
        <draw:frame draw:style-name="gr6" draw:text-style-name="P8" draw:layer="layout" svg:width="10.834cm" svg:height="6.5cm" svg:x="16.166cm" svg:y="4.5cm">
          <draw:image xlink:href="Pictures/10000000000007800000043895AD1C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4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6" draw:text-style-name="P7" draw:layer="layout" svg:width="22.5cm" svg:height="2.6cm" svg:x="4.5cm" svg:y="0.6cm" presentation:class="title" presentation:user-transformed="true">
          <draw:text-box>
            <text:p text:style-name="P7">Interfaz gráfica principal con diseño (Frontend)</text:p>
          </draw:text-box>
        </draw:frame>
        <draw:frame draw:style-name="gr7" draw:text-style-name="P8" draw:layer="layout" svg:width="18cm" svg:height="7.649cm" svg:x="5.5cm" svg:y="3.5cm">
          <draw:image xlink:href="Pictures/1000000000000780000004389B601516.png" xlink:type="simple" xlink:show="embed" xlink:actuate="onLoad" draw:mime-type="image/png">
            <text:p/>
          </draw:image>
        </draw:frame>
        <draw:frame draw:style-name="gr5" draw:text-style-name="P10" draw:layer="layout" svg:width="18.838cm" svg:height="1.072cm" svg:x="6.662cm" svg:y="11.5cm">
          <draw:text-box>
            <text:p text:style-name="P9">Muestra la interfaz moderna estilizada con tarjetas (Cards) de Bootstrap, donde se visualiza el catalogo completo de elementos, destacando el titulo, el resumen de la descripcion y el precio de cada producto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5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>
        <office:forms form:automatic-focus="false" form:apply-design-mode="false"/>
        <draw:frame presentation:style-name="pr6" draw:text-style-name="P7" draw:layer="layout" svg:width="22.5cm" svg:height="2.6cm" svg:x="4.5cm" svg:y="0.6cm" presentation:class="title" presentation:user-transformed="true">
          <draw:text-box>
            <text:p text:style-name="P7">Demostración de interactividad (Detalle del producto)</text:p>
          </draw:text-box>
        </draw:frame>
        <draw:frame draw:style-name="gr8" draw:text-style-name="P8" draw:layer="layout" svg:width="13.999cm" svg:height="6.999cm" svg:x="4.501cm" svg:y="3.8cm">
          <draw:image xlink:href="Pictures/100000000000078000000438698C3CCA.png" xlink:type="simple" xlink:show="embed" xlink:actuate="onLoad" draw:mime-type="image/png">
            <text:p/>
          </draw:image>
        </draw:frame>
        <draw:frame draw:style-name="gr5" draw:text-style-name="P10" draw:layer="layout" svg:width="17.121cm" svg:height="1.072cm" svg:x="7.379cm" svg:y="11.428cm">
          <draw:text-box>
            <text:p text:style-name="P9">Muestra la alerta emergente (o modal) desplegando la informacion a detalle, comprobando que el evento en Angular captura correctamente el objeto seleccionado y muestra su descripcion completa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6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CONCLUSION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4">
              <text:list-item>
                <text:p text:style-name="P11">Carga de datos exitosa: Se comprobó el funcionamiento del inyector de datos en el arranque de la aplicación, poblando la base de datos de manera limpia y sin duplicidades.</text:p>
              </text:list-item>
              <text:list-item>
                <text:p text:style-name="P11">Diseño y adaptabilidad: La integración de estilos modernos permitió estructurar un catálogo visualmente atractivo y escalable para el banco de ejercicios.</text:p>
              </text:list-item>
              <text:list-item>
                <text:p text:style-name="P11">Interactividad validada: Se confirmó que el enlace de eventos entre el archivo HTML y el componente TypeScript responde de forma precisa al usuario final al desplegar la información completa de cada producto.</text:p>
              </text:list-item>
              <text:list-item>
                <text:p text:style-name="P11">Consolidación técnica: La práctica reforzó el manejo de tipado estricto en el cliente y la manipulación de entidades enriquecidas en el servidor.</text:p>
              </text:list-item>
              <text:list-item>
                <text:p text:style-name="P12">4. Fuentes de Información</text:p>
              </text:list-item>
              <text:list-item>
                <text:p text:style-name="P11">Spring Boot Documentation. (2026). CommandLineRunner and Data Initialization. Obtenido de la documentación oficial de Spring: <text:a xlink:href="https://spring.io/" xlink:type="simple">spring.io</text:a></text:p>
              </text:list-item>
              <text:list-item>
                <text:p text:style-name="P11">Angular Documentation. (2026). Standalone Components and Data Binding. Obtenido de la documentación oficial de Angular: <text:a xlink:href="https://angular.io/" xlink:type="simple">angular.io</text:a></text:p>
              </text:list-item>
              <text:list-item>
                <text:p text:style-name="P11">Bootstrap Docs. (2026). Cards, Grid system, and CSS Utilities. Obtenido de la documentación oficial de Bootstrap: <text:a xlink:href="https://getbootstrap.com/" xlink:type="simple">getbootstrap.com</text:a></text:p>
                <text:p text:style-name="P1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7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modern" style:font-pitch="fixed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Fira Code SemiBold" svg:font-family="'Fira Code SemiBold'" style:font-pitch="fixed"/>
    <style:font-face style:name="FreeSans" svg:font-family="FreeSans" style:font-family-generic="system" style:font-pitch="variable"/>
    <style:font-face style:name="LM Sans Demi Cond 10" svg:font-family="'LM Sans Demi Cond 10'" style:font-adornments="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24pt" fo:language="es" fo:country="MX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7.6000003814697pt" fo:font-style="normal" fo:text-shadow="none" style:text-underline-style="none" fo:font-weight="normal" style:letter-kerning="true" style:font-size-asian="27.6000003814697pt" style:font-style-asian="normal" style:font-weight-asian="normal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1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draw:stroke="none" draw:fill="solid" draw:fill-color="#ea7500"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draw:stroke="none" draw:fill="solid" draw:fill-color="#780373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Purple">
      <style:graphic-properties loext:decorative="false"/>
    </style:style>
    <style:style style:name="Mgr11" style:family="graphic">
      <style:graphic-properties style:writing-mode="lr-tb" loext:decorative="false"/>
    </style:style>
    <style:style style:name="Mgr12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13" style:family="graphic" style:parent-style-name="standard">
      <style:graphic-properties draw:stroke="solid" svg:stroke-width="0.045cm" svg:stroke-color="#2a6099" draw:fill="solid" draw:fill-color="#bcc2c9" fo:min-height="0.108cm" fo:min-width="0cm" fo:padding-top="0.123cm" fo:padding-bottom="0.123cm" fo:padding-left="0.248cm" fo:padding-right="0.248cm" loext:decorative="false"/>
    </style:style>
    <style:style style:name="Mgr14" style:family="graphic" style:parent-style-name="standard">
      <style:graphic-properties draw:stroke="solid" svg:stroke-width="0.055cm" svg:stroke-color="#ff4000" draw:fill="solid" draw:fill-color="#f2cdc4" fo:min-height="0.1cm" fo:min-width="0cm" fo:padding-top="0.127cm" fo:padding-bottom="0.127cm" fo:padding-left="0.252cm" fo:padding-right="0.252cm" loext:decorative="false"/>
    </style:style>
    <style:style style:name="Mgr15" style:family="graphic" style:parent-style-name="standard">
      <style:graphic-properties draw:stroke="solid" svg:stroke-width="0.05cm" svg:stroke-color="#2a6099" draw:fill="solid" draw:fill-color="#c7ced6" fo:min-height="0.104cm" fo:min-width="0cm" loext:decorative="false"/>
    </style:style>
    <style:style style:name="Mgr16" style:family="graphic" style:parent-style-name="standard">
      <style:graphic-properties draw:stroke="solid" svg:stroke-width="0.05cm" svg:stroke-color="#ff4000" draw:fill="solid" draw:fill-color="#e6c2b9" fo:min-height="0.104cm" fo:min-width="0cm" loext:decorative="false"/>
    </style:style>
    <style:style style:name="Mgr17" style:family="graphic" style:parent-style-name="standard">
      <style:graphic-properties draw:stroke="solid" svg:stroke-width="0.055cm" svg:stroke-color="#2a6099" draw:fill="solid" draw:fill-color="#d3dae3" fo:min-height="0.1cm" fo:min-width="0cm" fo:padding-top="0.127cm" fo:padding-bottom="0.127cm" fo:padding-left="0.252cm" fo:padding-right="0.252cm" loext:decorative="false"/>
    </style:style>
    <style:style style:name="Mgr18" style:family="graphic" style:parent-style-name="standard">
      <style:graphic-properties draw:stroke="solid" svg:stroke-width="0.045cm" svg:stroke-color="#ff4000" draw:fill="solid" draw:fill-color="#d9b8af" fo:min-height="0.108cm" fo:min-width="0cm" fo:padding-top="0.123cm" fo:padding-bottom="0.123cm" fo:padding-left="0.248cm" fo:padding-right="0.248cm" loext:decorative="false"/>
    </style:style>
    <style:style style:name="Mgr19" style:family="graphic" style:parent-style-name="standard">
      <style:graphic-properties draw:stroke="solid" svg:stroke-width="0.06cm" svg:stroke-color="#2a6099" draw:fill="solid" draw:fill-color="#dee6ef" fo:min-height="0.094cm" fo:min-width="0cm" fo:padding-top="0.13cm" fo:padding-bottom="0.13cm" fo:padding-left="0.255cm" fo:padding-right="0.255cm" loext:decorative="false"/>
    </style:style>
    <style:style style:name="Mgr20" style:family="graphic" style:parent-style-name="standard">
      <style:graphic-properties draw:stroke="solid" svg:stroke-width="0.04cm" svg:stroke-color="#ff4000" draw:fill="solid" draw:fill-color="#ccada5" fo:min-height="0.114cm" fo:min-width="0cm" fo:padding-top="0.12cm" fo:padding-bottom="0.12cm" fo:padding-left="0.245cm" fo:padding-right="0.245cm" loext:decorative="false"/>
    </style:style>
    <style:style style:name="Mgr21" style:family="graphic" style:parent-style-name="standard">
      <style:graphic-properties draw:stroke="solid" svg:stroke-width="0.04cm" svg:stroke-color="#2a6099" draw:fill="solid" draw:fill-color="#afb6bd" fo:min-height="0.114cm" fo:min-width="0cm" fo:padding-top="0.12cm" fo:padding-bottom="0.12cm" fo:padding-left="0.245cm" fo:padding-right="0.245cm" loext:decorative="false"/>
    </style:style>
    <style:style style:name="Mgr22" style:family="graphic" style:parent-style-name="standard">
      <style:graphic-properties draw:stroke="solid" svg:stroke-width="0.06cm" svg:stroke-color="#ff4000" draw:fill="solid" draw:fill-color="#ffd8ce" fo:min-height="0.094cm" fo:min-width="0cm" fo:padding-top="0.13cm" fo:padding-bottom="0.13cm" fo:padding-left="0.255cm" fo:padding-right="0.255cm"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14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text-properties fo:color="#dddddd" loext:opacity="100%"/>
    </style:style>
    <style:style style:name="MP6" style:family="paragraph">
      <loext:graphic-properties draw:fill="solid" draw:fill-color="#ea7500"/>
      <style:text-properties fo:color="#dddddd" loext:opacity="100%"/>
    </style:style>
    <style:style style:name="MP7" style:family="paragraph">
      <loext:graphic-properties draw:fill="solid" draw:fill-color="#e8a202"/>
      <style:text-properties fo:color="#dddddd" loext:opacity="100%"/>
    </style:style>
    <style:style style:name="MP8" style:family="paragraph">
      <loext:graphic-properties draw:fill="solid" draw:fill-color="#168253"/>
      <style:text-properties fo:color="#dddddd" loext:opacity="100%"/>
    </style:style>
    <style:style style:name="MP9" style:family="paragraph">
      <loext:graphic-properties draw:fill="solid" draw:fill-color="#3465a4"/>
      <style:text-properties fo:color="#dddddd" loext:opacity="100%"/>
    </style:style>
    <style:style style:name="MP10" style:family="paragraph">
      <loext:graphic-properties draw:fill="solid" draw:fill-color="#780373"/>
      <style:text-properties fo:color="#dddddd" loext:opacity="100%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bcc2c9"/>
    </style:style>
    <style:style style:name="MP14" style:family="paragraph">
      <loext:graphic-properties draw:fill="solid" draw:fill-color="#f2cdc4"/>
    </style:style>
    <style:style style:name="MP15" style:family="paragraph">
      <loext:graphic-properties draw:fill="solid" draw:fill-color="#c7ced6"/>
    </style:style>
    <style:style style:name="MP16" style:family="paragraph">
      <loext:graphic-properties draw:fill="solid" draw:fill-color="#e6c2b9"/>
    </style:style>
    <style:style style:name="MP17" style:family="paragraph">
      <loext:graphic-properties draw:fill="solid" draw:fill-color="#d3dae3"/>
    </style:style>
    <style:style style:name="MP18" style:family="paragraph">
      <loext:graphic-properties draw:fill="solid" draw:fill-color="#d9b8af"/>
    </style:style>
    <style:style style:name="MP19" style:family="paragraph">
      <loext:graphic-properties draw:fill="solid" draw:fill-color="#dee6ef"/>
    </style:style>
    <style:style style:name="MP20" style:family="paragraph">
      <loext:graphic-properties draw:fill="solid" draw:fill-color="#ccada5"/>
    </style:style>
    <style:style style:name="MP21" style:family="paragraph">
      <loext:graphic-properties draw:fill="solid" draw:fill-color="#afb6bd"/>
    </style:style>
    <style:style style:name="MP22" style:family="paragraph">
      <loext:graphic-properties draw:fill="solid" draw:fill-color="#ffd8ce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13.5cm" svg:height="8cm" svg:x="0cm" svg:y="0cm" svg:viewBox="0 0 13501 8001" draw:points="0,0 0,500 10405,8001 13501,0">
        <text:p/>
      </draw:polygon>
      <draw:polygon draw:style-name="Mgr4" draw:text-style-name="MP6" draw:layer="backgroundobjects" svg:width="16cm" svg:height="6cm" svg:x="12cm" svg:y="0cm" svg:viewBox="0 0 16001 6001" draw:points="16001,0 2500,0 0,6001 16001,2500">
        <text:p/>
      </draw:polygon>
      <draw:polygon draw:style-name="Mgr5" draw:text-style-name="MP7" draw:layer="backgroundobjects" svg:width="12.5cm" svg:height="10.5cm" svg:x="15.5cm" svg:y="3.5cm" svg:viewBox="0 0 12501 10501" draw:points="12501,10501 12501,0 0,2500">
        <text:p/>
      </draw:polygon>
      <draw:polygon draw:style-name="Mgr6" draw:text-style-name="MP8" draw:layer="backgroundobjects" svg:width="12.5cm" svg:height="7.25cm" svg:x="15.5cm" svg:y="8.5cm" svg:viewBox="0 0 12501 7251" draw:points="12501,7251 12501,6501 2000,0 0,7251">
        <text:p/>
      </draw:polygon>
      <draw:polygon draw:style-name="Mgr7" draw:text-style-name="MP9" draw:layer="backgroundobjects" svg:width="16cm" svg:height="5.3cm" svg:x="0cm" svg:y="10.45cm" svg:viewBox="0 0 16001 5301" draw:points="0,5301 14501,5301 16001,0 0,2546">
        <text:p/>
      </draw:polygon>
      <draw:polygon draw:style-name="Mgr8" draw:text-style-name="MP10" draw:layer="backgroundobjects" svg:width="12cm" svg:height="10.5cm" svg:x="0cm" svg:y="1.5cm" svg:viewBox="0 0 12001 10501" draw:points="0,0 0,10501 12001,8501">
        <text:p/>
      </draw:polygon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12" draw:layer="backgroundobjects" svg:width="9cm" svg:height="1cm" svg:x="9.5cm" svg:y="14.5cm" presentation:class="footer">
        <draw:text-box>
          <text:p text:style-name="MP11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úmero&gt;</text:page-number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9.1cm" svg:height="9cm" svg:x="0cm" svg:y="0cm" svg:viewBox="0 0 9101 9001" draw:points="0,0 9101,0 6101,9001 0,4501">
        <text:p/>
      </draw:polygon>
      <draw:polygon draw:style-name="Mgr9" draw:layer="backgroundobjects" svg:width="15cm" svg:height="3cm" svg:x="9cm" svg:y="0cm" svg:viewBox="0 0 15001 3001" draw:points="1000,0 0,3001 15001,0">
        <text:p/>
      </draw:polygon>
      <draw:polygon draw:style-name="Mgr5" draw:text-style-name="MP7" draw:layer="backgroundobjects" svg:width="11cm" svg:height="10.5cm" svg:x="17cm" svg:y="0cm" svg:viewBox="0 0 11001 10501" draw:points="11001,0 0,2500 11001,10501">
        <text:p/>
      </draw:polygon>
      <draw:polygon draw:style-name="Mgr6" draw:text-style-name="MP8" draw:layer="backgroundobjects" svg:width="9cm" svg:height="8.75cm" svg:x="19cm" svg:y="7cm" svg:viewBox="0 0 9001 8751" draw:points="9001,4501 3000,0 0,8751 9001,8751">
        <text:p/>
      </draw:polygon>
      <draw:polygon draw:style-name="Mgr7" draw:text-style-name="MP9" draw:layer="backgroundobjects" svg:width="14cm" svg:height="3.25cm" svg:x="5cm" svg:y="12.5cm" svg:viewBox="0 0 14001 3251" draw:points="0,3251 13001,3251 14001,0">
        <text:p/>
      </draw:polygon>
      <draw:polygon draw:style-name="Mgr10" draw:layer="backgroundobjects" svg:width="11.1cm" svg:height="9.75cm" svg:x="0cm" svg:y="6cm" svg:viewBox="0 0 11101 9751" draw:points="0,9751 1602,9751 11101,7440 0,0">
        <text:p/>
      </draw:polygon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úmero&gt;</text:page-number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5.5cm" svg:height="9.5cm" svg:x="0cm" svg:y="0cm" svg:viewBox="0 0 5501 9501" draw:points="0,0 0,8001 2500,9501 5501,0">
        <text:p/>
      </draw:polygon>
      <draw:polygon draw:style-name="Mgr9" draw:layer="backgroundobjects" svg:width="5.5cm" svg:height="1cm" svg:x="6.5cm" svg:y="0cm" svg:viewBox="0 0 5501 1001" draw:points="500,0 0,1001 5501,0">
        <text:p/>
      </draw:polygon>
      <draw:polygon draw:style-name="Mgr5" draw:text-style-name="MP7" draw:layer="backgroundobjects" svg:width="10cm" svg:height="7.5cm" svg:x="18cm" svg:y="0cm" svg:viewBox="0 0 10001 7501" draw:points="10001,0 1000,0 0,500 10001,7501">
        <text:p/>
      </draw:polygon>
      <draw:polygon draw:style-name="Mgr6" draw:text-style-name="MP8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9" draw:layer="backgroundobjects" svg:width="4.999cm" svg:height="1.25cm" svg:x="16.5cm" svg:y="14.5cm" svg:viewBox="0 0 5000 1251" draw:points="4500,1251 5000,0 0,1251">
        <text:p/>
      </draw:polygon>
      <draw:polygon draw:style-name="Mgr10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3cm" svg:height="9.5cm" svg:x="0cm" svg:y="0cm" svg:viewBox="0 0 3001 9501" draw:points="0,0 0,9501 3001,0">
        <text:p/>
      </draw:polygon>
      <draw:polygon draw:style-name="Mgr5" draw:text-style-name="MP7" draw:layer="backgroundobjects" svg:width="6.5cm" svg:height="4.5cm" svg:x="21.5cm" svg:y="0cm" svg:viewBox="0 0 6501 4501" draw:points="6501,0 0,0 6501,4501">
        <text:p/>
      </draw:polygon>
      <draw:polygon draw:style-name="Mgr6" draw:text-style-name="MP8" draw:layer="backgroundobjects" svg:width="3cm" svg:height="8.75cm" svg:x="25cm" svg:y="7cm" svg:viewBox="0 0 3001 8751" draw:points="3001,8751 3001,0 0,8751">
        <text:p/>
      </draw:polygon>
      <draw:polygon draw:style-name="Mgr10" draw:layer="backgroundobjects" svg:width="5.5cm" svg:height="3.75cm" svg:x="0cm" svg:y="12cm" svg:viewBox="0 0 5501 3751" draw:points="0,0 0,3751 5501,3751">
        <text:p/>
      </draw:polygon>
      <draw:frame presentation:style-name="Mpr10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0" draw:text-style-name="MP12" draw:layer="backgroundobjects" svg:width="9cm" svg:height="1cm" svg:x="9.5cm" svg:y="14.5cm" presentation:class="footer">
        <draw:text-box>
          <text:p text:style-name="MP11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page-number>&lt;número&gt;</text:page-number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layer="backgroundobjects" svg:width="22.5cm" svg:height="9.134cm" svg:x="4.5cm" svg:y="3.8cm" presentation:class="outline" presentation:placeholder="true">
        <draw:text-box/>
      </draw:frame>
      <draw:frame presentation:style-name="Mpr13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3" draw:text-style-name="MP12" draw:layer="backgroundobjects" svg:width="8.875cm" svg:height="1.085cm" svg:x="11.075cm" svg:y="14.347cm" presentation:class="footer">
        <draw:text-box>
          <text:p text:style-name="MP11"><presentation:footer/></text:p>
        </draw:text-box>
      </draw:frame>
      <draw:frame presentation:style-name="Mpr13" draw:text-style-name="MP4" draw:layer="backgroundobjects" svg:width="6.523cm" svg:height="1.085cm" svg:x="20.075cm" svg:y="14.347cm" presentation:class="page-number">
        <draw:text-box>
          <text:p text:style-name="MP3"><text:page-number>&lt;número&gt;</text:page-number></text:p>
        </draw:text-box>
      </draw:frame>
      <draw:g draw:style-name="Mgr11">
        <draw:connector draw:style-name="Mgr12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12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12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12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12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12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12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12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12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12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12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12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12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12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12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12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12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12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12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12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12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12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12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12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12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12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12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13" draw:text-style-name="MP13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4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6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7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8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9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20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9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20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7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8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6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4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21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22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21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22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4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6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7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8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9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20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9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20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7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8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6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4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21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22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21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22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4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6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7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8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9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20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9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20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7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8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6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2">
        <office:forms form:automatic-focus="false" form:apply-design-mode="false"/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23:14:53.189516260</meta:creation-date>
    <meta:editing-duration>PT8M26S</meta:editing-duration>
    <meta:editing-cycles>3</meta:editing-cycles>
    <meta:generator>LibreOffice/26.2.2.2$Linux_X86_64 LibreOffice_project/620$Build-2</meta:generator>
    <dc:title>Focus</dc:title>
    <dc:description>This work is licensed under a Creative Commons-0 licence.
It makes use of the works of Zirk.</dc:description>
    <dc:date>2026-06-11T23:33:55.429293141</dc:date>
    <meta:document-statistic meta:object-count="201"/>
  </office:meta>
</office:document-meta>
</file>